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allaad"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Normaallaad" style:family="paragraph">
      <style:text-properties fo:font-weight="bold" style:font-weight-asian="bold" style:font-weight-complex="bold"/>
    </style:style>
    <style:style style:name="P3" style:parent-style-name="Normaallaad" style:family="paragraph">
      <style:text-properties fo:font-weight="bold" style:font-weight-asian="bold" style:font-weight-complex="bold"/>
    </style:style>
    <style:style style:name="P4" style:parent-style-name="Normaallaad" style:family="paragraph">
      <style:text-properties fo:font-weight="bold" style:font-weight-asian="bold" style:font-weight-complex="bold"/>
    </style:style>
    <style:style style:name="P5" style:parent-style-name="Normaallaad" style:family="paragraph">
      <style:text-properties fo:font-weight="bold" style:font-weight-asian="bold" style:font-weight-complex="bold"/>
    </style:style>
    <style:style style:name="P6" style:parent-style-name="Loendilõik" style:list-style-name="LFO2" style:family="paragraph"/>
    <style:style style:name="P7" style:parent-style-name="Loendilõik" style:list-style-name="LFO2" style:family="paragraph"/>
    <style:style style:name="P8" style:parent-style-name="Loendilõik" style:list-style-name="LFO2" style:family="paragraph"/>
    <style:style style:name="P9" style:parent-style-name="Loendilõik" style:list-style-name="LFO2" style:family="paragraph"/>
    <style:style style:name="P10" style:parent-style-name="Loendilõik" style:list-style-name="LFO2" style:family="paragraph"/>
    <style:style style:name="P11" style:parent-style-name="Normaallaad" style:family="paragraph">
      <style:text-properties fo:font-weight="bold" style:font-weight-asian="bold" style:font-weight-complex="bold"/>
    </style:style>
    <style:style style:name="P12" style:parent-style-name="Loendilõik" style:list-style-name="LFO3" style:family="paragraph"/>
    <style:style style:name="P13" style:parent-style-name="Loendilõik" style:list-style-name="LFO3" style:family="paragraph"/>
    <style:style style:name="P14" style:parent-style-name="Loendilõik" style:list-style-name="LFO3" style:family="paragraph"/>
    <style:style style:name="P15" style:parent-style-name="Loendilõik" style:list-style-name="LFO3" style:family="paragraph"/>
    <style:style style:name="P16" style:parent-style-name="Loendilõik" style:list-style-name="LFO3" style:family="paragraph"/>
    <style:style style:name="P17" style:parent-style-name="Loendilõik" style:list-style-name="LFO3" style:family="paragraph"/>
    <style:style style:name="P18" style:parent-style-name="Loendilõik" style:list-style-name="LFO3" style:family="paragraph"/>
    <style:style style:name="P19" style:parent-style-name="Loendilõik" style:list-style-name="LFO3" style:family="paragraph"/>
    <style:style style:name="P20" style:parent-style-name="Loendilõik" style:list-style-name="LFO3" style:family="paragraph"/>
    <style:style style:name="P21" style:parent-style-name="Loendilõik" style:list-style-name="LFO3" style:family="paragraph"/>
    <style:style style:name="P22" style:parent-style-name="Loendilõik" style:list-style-name="LFO3" style:family="paragraph"/>
    <style:style style:name="P23" style:parent-style-name="Loendilõik" style:list-style-name="LFO3" style:family="paragraph"/>
    <style:style style:name="P24" style:parent-style-name="Loendilõik" style:list-style-name="LFO3" style:family="paragraph"/>
    <style:style style:name="P25" style:parent-style-name="Loendilõik" style:list-style-name="LFO3" style:family="paragraph"/>
    <style:style style:name="P26" style:parent-style-name="Normaallaad" style:family="paragraph">
      <style:text-properties fo:font-weight="bold" style:font-weight-asian="bold" style:font-weight-complex="bold"/>
    </style:style>
    <style:style style:name="T27" style:parent-style-name="Lõiguvaikefont" style:family="text">
      <style:text-properties fo:font-weight="bold" style:font-weight-asian="bold" style:font-weight-complex="bold"/>
    </style:style>
    <style:style style:name="P28" style:parent-style-name="Normaallaad" style:family="paragraph">
      <style:text-properties fo:font-weight="bold" style:font-weight-asian="bold" style:font-weight-complex="bold"/>
    </style:style>
    <style:style style:name="T29" style:parent-style-name="Lõiguvaikefont" style:family="text">
      <style:text-properties style:text-underline-type="single" style:text-underline-style="solid" style:text-underline-width="auto" style:text-underline-mode="continuous"/>
    </style:style>
    <style:style style:name="T30" style:parent-style-name="Lõiguvaikefont" style:family="text">
      <style:text-properties fo:font-weight="bold" style:font-weight-asian="bold" style:font-weight-complex="bold"/>
    </style:style>
    <style:style style:name="P31" style:parent-style-name="Normaallaad" style:family="paragraph">
      <style:text-properties fo:font-weight="bold" style:font-weight-asian="bold" style:font-weight-complex="bold"/>
    </style:style>
    <style:style style:name="T32" style:parent-style-name="Lõiguvaikefont" style:family="text">
      <style:text-properties fo:font-weight="bold" style:font-weight-asian="bold" style:font-weight-complex="bold"/>
    </style:style>
    <style:style style:name="T33" style:parent-style-name="Lõiguvaikefont" style:family="text">
      <style:text-properties fo:font-weight="bold" style:font-weight-asian="bold" style:font-weight-complex="bold"/>
    </style:style>
    <style:style style:name="T34" style:parent-style-name="Lõiguvaikefont" style:family="text">
      <style:text-properties fo:font-weight="bold" style:font-weight-asian="bold" style:font-weight-complex="bold"/>
    </style:style>
    <style:style style:name="T35" style:parent-style-name="Lõiguvaikefont" style:family="text">
      <style:text-properties fo:font-weight="bold" style:font-weight-asian="bold" style:font-weight-complex="bold"/>
    </style:style>
    <style:style style:name="T36" style:parent-style-name="Lõiguvaikefont" style:family="text">
      <style:text-properties fo:font-weight="bold" style:font-weight-asian="bold" style:font-weight-complex="bold"/>
    </style:style>
    <style:style style:name="T37" style:parent-style-name="Lõiguvaikefont" style:family="text">
      <style:text-properties fo:font-weight="bold" style:font-weight-asian="bold" style:font-weight-complex="bold"/>
    </style:style>
    <style:style style:name="P38" style:parent-style-name="Normaallaad" style:family="paragraph">
      <style:text-properties fo:font-weight="bold" style:font-weight-asian="bold" style:font-weight-complex="bold"/>
    </style:style>
    <style:style style:name="T39" style:parent-style-name="Lõiguvaikefont" style:family="text">
      <style:text-properties fo:font-weight="bold" style:font-weight-asian="bold" style:font-weight-complex="bold"/>
    </style:style>
    <style:style style:name="T40" style:parent-style-name="Lõiguvaikefont" style:family="text">
      <style:text-properties fo:font-weight="bold" style:font-weight-asian="bold" style:font-weight-complex="bold"/>
    </style:style>
    <style:style style:name="T41" style:parent-style-name="Lõiguvaikefont" style:family="text">
      <style:text-properties fo:font-weight="bold" style:font-weight-asian="bold" style:font-weight-complex="bold"/>
    </style:style>
    <style:style style:name="T42" style:parent-style-name="Lõiguvaikefont" style:family="text">
      <style:text-properties fo:font-weight="bold" style:font-weight-asian="bold" style:font-weight-complex="bold"/>
    </style:style>
    <style:style style:name="T43" style:parent-style-name="Lõiguvaikefont" style:family="text">
      <style:text-properties fo:font-weight="bold" style:font-weight-asian="bold" style:font-weight-complex="bold"/>
    </style:style>
    <style:style style:name="P44" style:parent-style-name="Normaallaad" style:family="paragraph">
      <style:text-properties fo:font-weight="bold" style:font-weight-asian="bold" style:font-weight-complex="bold"/>
    </style:style>
    <style:style style:name="T45" style:parent-style-name="Lõiguvaikefont" style:family="text">
      <style:text-properties fo:font-weight="bold" style:font-weight-asian="bold" style:font-weight-complex="bold"/>
    </style:style>
    <style:style style:name="T46" style:parent-style-name="Lõiguvaikefont" style:family="text">
      <style:text-properties fo:font-weight="bold" style:font-weight-asian="bold" style:font-weight-complex="bold"/>
    </style:style>
    <style:style style:name="T47" style:parent-style-name="Lõiguvaikefont" style:family="text">
      <style:text-properties fo:font-weight="bold" style:font-weight-asian="bold" style:font-weight-complex="bold"/>
    </style:style>
    <style:style style:name="P48" style:parent-style-name="Normaallaad" style:family="paragraph">
      <style:text-properties fo:font-weight="bold" style:font-weight-asian="bold" style:font-weight-complex="bold"/>
    </style:style>
    <style:style style:name="T49" style:parent-style-name="Lõiguvaikefont" style:family="text">
      <style:text-properties fo:font-weight="bold" style:font-weight-asian="bold" style:font-weight-complex="bold"/>
    </style:style>
    <style:style style:name="T50" style:parent-style-name="Lõiguvaikefont" style:family="text">
      <style:text-properties fo:font-weight="bold" style:font-weight-asian="bold" style:font-weight-complex="bold"/>
    </style:style>
    <style:style style:name="T51" style:parent-style-name="Lõiguvaikefont" style:family="text">
      <style:text-properties fo:font-weight="bold" style:font-weight-asian="bold" style:font-weight-complex="bold"/>
    </style:style>
    <style:style style:name="T52" style:parent-style-name="Lõiguvaikefont" style:family="text">
      <style:text-properties fo:font-weight="bold" style:font-weight-asian="bold" style:font-weight-complex="bold"/>
    </style:style>
    <style:style style:name="T53" style:parent-style-name="Lõiguvaikefont" style:family="text">
      <style:text-properties fo:font-weight="bold" style:font-weight-asian="bold" style:font-weight-complex="bold"/>
    </style:style>
    <style:style style:name="P54" style:parent-style-name="Normaallaad" style:family="paragraph">
      <style:paragraph-properties fo:text-align="center"/>
    </style:style>
    <style:style style:name="P55" style:parent-style-name="Normaallaad" style:family="paragraph">
      <style:paragraph-properties fo:text-align="center"/>
    </style:style>
    <style:style style:name="P56" style:parent-style-name="Normaallaad" style:family="paragraph">
      <style:paragraph-properties fo:text-align="center"/>
    </style:style>
    <style:style style:name="P57" style:parent-style-name="Normaallaad" style:family="paragraph">
      <style:paragraph-properties fo:text-align="center"/>
    </style:style>
    <style:style style:name="P58" style:parent-style-name="Normaallaad" style:family="paragraph">
      <style:paragraph-properties fo:text-align="center"/>
    </style:style>
    <style:style style:name="T59" style:parent-style-name="Lõiguvaikefont" style:family="text">
      <style:text-properties fo:font-weight="bold" style:font-weight-asian="bold" style:font-weight-complex="bold"/>
    </style:style>
    <style:style style:name="T60" style:parent-style-name="Lõiguvaikefont" style:family="text">
      <style:text-properties fo:font-weight="bold" style:font-weight-asian="bold" style:font-weight-complex="bold"/>
    </style:style>
    <style:style style:name="T61" style:parent-style-name="Lõiguvaikefont" style:family="text">
      <style:text-properties fo:font-weight="bold" style:font-weight-asian="bold" style:font-weight-complex="bold"/>
    </style:style>
    <style:style style:name="T62" style:parent-style-name="Lõiguvaikefont" style:family="text">
      <style:text-properties fo:font-weight="bold" style:font-weight-asian="bold" style:font-weight-complex="bold"/>
    </style:style>
    <style:style style:name="T63" style:parent-style-name="Lõiguvaikefont" style:family="text">
      <style:text-properties fo:font-weight="bold" style:font-weight-asian="bold" style:font-weight-complex="bold"/>
    </style:style>
    <style:style style:name="P64" style:parent-style-name="Normaallaad" style:family="paragraph">
      <style:paragraph-properties fo:text-align="center"/>
    </style:style>
    <style:style style:name="P65" style:parent-style-name="Normaallaad" style:family="paragraph">
      <style:paragraph-properties fo:text-align="center"/>
    </style:style>
    <style:style style:name="P66" style:parent-style-name="Normaallaad" style:family="paragraph">
      <style:text-properties fo:font-weight="bold" style:font-weight-asian="bold" style:font-weight-complex="bold"/>
    </style:style>
    <style:style style:name="T67" style:parent-style-name="Lõiguvaikefont" style:family="text">
      <style:text-properties fo:font-weight="bold" style:font-weight-asian="bold" style:font-weight-complex="bold"/>
    </style:style>
    <style:style style:name="T68" style:parent-style-name="Lõiguvaikefont" style:family="text">
      <style:text-properties fo:font-weight="bold" style:font-weight-asian="bold" style:font-weight-complex="bold"/>
    </style:style>
    <style:style style:name="T69" style:parent-style-name="Lõiguvaikefont" style:family="text">
      <style:text-properties fo:font-weight="bold" style:font-weight-asian="bold" style:font-weight-complex="bold"/>
    </style:style>
    <style:style style:name="P70" style:parent-style-name="Normaallaad" style:family="paragraph">
      <style:paragraph-properties fo:text-align="center"/>
    </style:style>
    <style:style style:name="P71" style:parent-style-name="Normaallaad" style:family="paragraph">
      <style:paragraph-properties fo:text-align="center"/>
    </style:style>
    <style:style style:name="P72" style:parent-style-name="Normaallaad" style:family="paragraph">
      <style:paragraph-properties fo:text-align="center"/>
    </style:style>
    <style:style style:name="P73" style:parent-style-name="Normaallaad" style:family="paragraph">
      <style:paragraph-properties fo:text-align="center"/>
    </style:style>
    <style:style style:name="P74" style:parent-style-name="Normaallaad" style:family="paragraph">
      <style:text-properties fo:font-weight="bold" style:font-weight-asian="bold" style:font-weight-complex="bold"/>
    </style:style>
    <style:style style:name="P75" style:parent-style-name="Loendilõik" style:list-style-name="LFO4" style:family="paragraph"/>
    <style:style style:name="P76" style:parent-style-name="Loendilõik" style:list-style-name="LFO4" style:family="paragraph"/>
    <style:style style:name="P77" style:parent-style-name="Loendilõik" style:list-style-name="LFO4" style:family="paragraph"/>
    <style:style style:name="P78" style:parent-style-name="Loendilõik" style:list-style-name="LFO4" style:family="paragraph"/>
    <style:style style:name="P79" style:parent-style-name="Loendilõik" style:list-style-name="LFO4" style:family="paragraph"/>
    <style:style style:name="P80" style:parent-style-name="Normaallaad" style:family="paragraph">
      <style:paragraph-properties fo:text-align="center"/>
    </style:style>
    <style:style style:name="P81" style:parent-style-name="Normaallaad" style:family="paragraph">
      <style:text-properties fo:font-weight="bold" style:font-weight-asian="bold" style:font-weight-complex="bold"/>
    </style:style>
    <style:style style:name="P82" style:parent-style-name="Normaallaad" style:family="paragraph">
      <style:text-properties fo:font-weight="bold" style:font-weight-asian="bold" style:font-weight-complex="bold"/>
    </style:style>
    <style:style style:name="P83" style:parent-style-name="Normaallaad" style:family="paragraph">
      <style:paragraph-properties fo:text-align="center"/>
    </style:style>
    <style:style style:name="P84" style:parent-style-name="Normaallaad" style:family="paragraph">
      <style:paragraph-properties fo:text-align="center"/>
    </style:style>
    <style:style style:name="P85" style:parent-style-name="Normaallaad" style:family="paragraph">
      <style:paragraph-properties fo:text-align="center"/>
    </style:style>
    <style:style style:name="P86" style:parent-style-name="Normaallaad" style:family="paragraph">
      <style:paragraph-properties fo:text-align="center"/>
    </style:style>
    <style:style style:name="P87" style:parent-style-name="Normaallaad" style:family="paragraph">
      <style:text-properties fo:font-weight="bold" style:font-weight-asian="bold" style:font-weight-complex="bold"/>
    </style:style>
    <style:style style:name="T88" style:parent-style-name="Lõiguvaikefont" style:family="text">
      <style:text-properties fo:font-weight="bold" style:font-weight-asian="bold" style:font-weight-complex="bold"/>
    </style:style>
    <style:style style:name="T89" style:parent-style-name="Lõiguvaikefont" style:family="text">
      <style:text-properties fo:font-weight="bold" style:font-weight-asian="bold" style:font-weight-complex="bold"/>
    </style:style>
    <style:style style:name="P90" style:parent-style-name="Normaallaad" style:family="paragraph">
      <style:paragraph-properties fo:text-align="center"/>
    </style:style>
    <style:style style:name="P91" style:parent-style-name="Normaallaad" style:family="paragraph">
      <style:paragraph-properties fo:text-align="center"/>
    </style:style>
    <style:style style:name="T92" style:parent-style-name="Lõiguvaikefont" style:family="text">
      <style:text-properties fo:font-weight="bold" style:font-weight-asian="bold" style:font-weight-complex="bold"/>
    </style:style>
    <style:style style:name="T93" style:parent-style-name="Lõiguvaikefont" style:family="text">
      <style:text-properties fo:font-weight="bold" style:font-weight-asian="bold" style:font-weight-complex="bold"/>
    </style:style>
    <style:style style:name="P94" style:parent-style-name="Normaallaad" style:family="paragraph">
      <style:paragraph-properties fo:text-align="center"/>
    </style:style>
    <style:style style:name="P95" style:parent-style-name="Normaallaad" style:family="paragraph">
      <style:paragraph-properties fo:text-align="center"/>
    </style:style>
    <style:style style:name="P96" style:parent-style-name="Normaallaad" style:family="paragraph">
      <style:text-properties fo:font-weight="bold" style:font-weight-asian="bold" style:font-weight-complex="bold"/>
    </style:style>
    <style:style style:name="P97" style:parent-style-name="Loendilõik" style:list-style-name="LFO5" style:family="paragraph"/>
    <style:style style:name="P98" style:parent-style-name="Loendilõik" style:list-style-name="LFO5" style:family="paragraph"/>
    <style:style style:name="P99" style:parent-style-name="Loendilõik" style:list-style-name="LFO5" style:family="paragraph"/>
    <style:style style:name="P100" style:parent-style-name="Loendilõik" style:list-style-name="LFO5" style:family="paragraph"/>
    <style:style style:name="P101" style:parent-style-name="Loendilõik" style:list-style-name="LFO5" style:family="paragraph"/>
    <style:style style:name="P102" style:parent-style-name="Normaallaad" style:family="paragraph">
      <style:text-properties fo:font-weight="bold" style:font-weight-asian="bold" style:font-weight-complex="bold"/>
    </style:style>
    <style:style style:name="P103" style:parent-style-name="Normaallaad" style:family="paragraph">
      <style:paragraph-properties fo:text-align="center"/>
    </style:style>
    <style:style style:name="P104" style:parent-style-name="Normaallaad" style:family="paragraph">
      <style:paragraph-properties fo:text-align="center"/>
    </style:style>
    <style:style style:name="P105" style:parent-style-name="Normaallaad" style:family="paragraph">
      <style:paragraph-properties fo:text-align="center"/>
    </style:style>
    <style:style style:name="P106" style:parent-style-name="Normaallaad" style:family="paragraph">
      <style:text-properties fo:font-weight="bold" style:font-weight-asian="bold" style:font-weight-complex="bold"/>
    </style:style>
    <style:style style:name="P107" style:parent-style-name="Normaallaad" style:family="paragraph">
      <style:paragraph-properties fo:text-align="center"/>
    </style:style>
    <style:style style:name="P108" style:parent-style-name="Normaallaad" style:family="paragraph">
      <style:paragraph-properties fo:text-align="center"/>
    </style:style>
    <style:style style:name="P109" style:parent-style-name="Normaallaad" style:family="paragraph">
      <style:text-properties fo:font-weight="bold" style:font-weight-asian="bold" style:font-weight-complex="bold"/>
    </style:style>
    <style:style style:name="T110" style:parent-style-name="Lõiguvaikefont" style:family="text">
      <style:text-properties fo:font-weight="bold" style:font-weight-asian="bold" style:font-weight-complex="bold"/>
    </style:style>
    <style:style style:name="T111" style:parent-style-name="Lõiguvaikefont" style:family="text">
      <style:text-properties fo:font-weight="bold" style:font-weight-asian="bold" style:font-weight-complex="bold"/>
    </style:style>
    <style:style style:name="T112" style:parent-style-name="Lõiguvaikefont" style:family="text">
      <style:text-properties fo:font-weight="bold" style:font-weight-asian="bold" style:font-weight-complex="bold"/>
    </style:style>
    <style:style style:name="T113" style:parent-style-name="Lõiguvaikefont" style:family="text">
      <style:text-properties fo:font-weight="bold" style:font-weight-asian="bold" style:font-weight-complex="bold"/>
    </style:style>
    <style:style style:name="P114" style:parent-style-name="Normaallaad" style:family="paragraph">
      <style:text-properties fo:font-weight="bold" style:font-weight-asian="bold" style:font-weight-complex="bold"/>
    </style:style>
    <style:style style:name="P115" style:parent-style-name="Normaallaad" style:family="paragraph">
      <style:text-properties fo:font-weight="bold" style:font-weight-asian="bold" style:font-weight-complex="bold"/>
    </style:style>
    <style:style style:name="P116" style:parent-style-name="Normaallaad" style:family="paragraph">
      <style:text-properties fo:font-weight="bold" style:font-weight-asian="bold" style:font-weight-complex="bold"/>
    </style:style>
    <style:style style:name="P117" style:parent-style-name="Normaallaad" style:family="paragraph">
      <style:text-properties fo:font-weight="bold" style:font-weight-asian="bold" style:font-weight-complex="bold"/>
    </style:style>
    <style:style style:name="P118" style:parent-style-name="Loendilõik" style:list-style-name="LFO1" style:family="paragraph"/>
    <style:style style:name="P119" style:parent-style-name="Loendilõik" style:list-style-name="LFO1" style:family="paragraph"/>
    <style:style style:name="P120" style:parent-style-name="Loendilõik" style:list-style-name="LFO1" style:family="paragraph"/>
    <style:style style:name="P121" style:parent-style-name="Normaallaad" style:family="paragraph">
      <style:text-properties fo:font-weight="bold" style:font-weight-asian="bold" style:font-weight-complex="bold"/>
    </style:style>
    <style:style style:name="P122" style:parent-style-name="Normaallaad" style:family="paragraph">
      <style:text-properties fo:font-weight="bold" style:font-weight-asian="bold" style:font-weight-complex="bold"/>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office:automatic-styles>
  <office:body>
    <office:text text:use-soft-page-breaks="true">
      <text:p text:style-name="P1">Sünniandmestiku analüüs ja sünnikaalu prognoosiva mudeli treenimine andmestikul.</text:p>
      <text:p text:style-name="P2"/>
      <text:p text:style-name="P3">Sissejuhatus.</text:p>
      <text:p text:style-name="Normaallaad">Antud töö on koostatud reaalsete andmete baasil andmetöötluse, -analüüsi ja masinõppe eesmärgil.</text:p>
      <text:p text:style-name="P4">Andmestik.</text:p>
      <text:p text:style-name="Normaallaad">Töös kasutatud sünniandmestik koosneb<text:s/>ligikaudu 4+<text:s/>aasta<text:s/>andmetest, kust on eemaldatud kõik isikuandmed, ehk tegemist on<text:s/>anonüümitud andmega ja<text:s/>mis on Tervise Arengu Instituudi sisemiseks<text:s/>või volitatud kasutajatele kasutamiseks.<text:s/></text:p>
      <text:p text:style-name="P5">Eesmärk.</text:p>
      <text:p text:style-name="Normaallaad">Eesmärgiks on<text:s/>uurida<text:s/>ja teostada järgmised toimingud:<text:s/></text:p>
      <text:list text:style-name="LFO2" text:continue-numbering="true">
        <text:list-item>
          <text:p text:style-name="P6">Andmestik korrastada ja puhastada</text:p>
        </text:list-item>
        <text:list-item>
          <text:p text:style-name="P7">Analüüsida andmeid ja leida<text:s/>võimalikud<text:s/>seosed</text:p>
        </text:list-item>
        <text:list-item>
          <text:p text:style-name="P8">Luua ja treenida andmestikul põhinev mudel, mis ennustab valitud tunnuste baasil sünnikaalu, ja võimalusel ka sünnipikkust.</text:p>
        </text:list-item>
        <text:list-item>
          <text:p text:style-name="P9">Luua<text:s/>lisaks<text:s/>üks või mitu alternatiivse meetodiga masinõppe<text:s/>mudelit ning võrrelda mudelid omavahel<text:s/></text:p>
        </text:list-item>
        <text:list-item>
          <text:p text:style-name="P10">Hüpotees: suitsetamine mõjutab keskmiselt sünnikaalu</text:p>
        </text:list-item>
      </text:list>
      <text:p text:style-name="P11">Andmestiku struktuur.</text:p>
      <text:p text:style-name="Normaallaad">Andmestruktuur koosneb järgmistest<text:s/>elementidest/väljadest:</text:p>
      <text:list text:style-name="LFO3" text:continue-numbering="true">
        <text:list-item>
          <text:p text:style-name="P12">ema perekonnaseis<text:s/>(kood)<text:s/>– kategooriline</text:p>
        </text:list-item>
        <text:list-item>
          <text:p text:style-name="P13">ema perekonnaseis<text:s/>–<text:s/>kategooriline</text:p>
        </text:list-item>
        <text:list-item>
          <text:p text:style-name="P14">suitsetamine<text:s/>(kood)<text:s/>–<text:s/>kategooriline</text:p>
        </text:list-item>
        <text:list-item>
          <text:p text:style-name="P15">suitsetamine<text:s/>–<text:s/>kategooriline</text:p>
        </text:list-item>
        <text:list-item>
          <text:p text:style-name="P16">raseduskestus nädalad<text:s/>–<text:s/>numbriline</text:p>
        </text:list-item>
        <text:list-item>
          <text:p text:style-name="P17">raseduskestus päevad<text:s/>–<text:s/>numbriline</text:p>
        </text:list-item>
        <text:list-item>
          <text:p text:style-name="P18">ema vanus<text:s/>–<text:s/>numbriline</text:p>
        </text:list-item>
        <text:list-item>
          <text:p text:style-name="P19">isa vanus<text:s/>–<text:s/>numbriline</text:p>
        </text:list-item>
        <text:list-item>
          <text:p text:style-name="P20">lapse sugu<text:s/>–<text:s/>kategooriline</text:p>
        </text:list-item>
        <text:list-item>
          <text:p text:style-name="P21">sündinud laste arv<text:s/>–<text:s/>numbriline</text:p>
        </text:list-item>
        <text:list-item>
          <text:p text:style-name="P22">sünnikaal<text:s/>–<text:s/>numbriline</text:p>
        </text:list-item>
        <text:list-item>
          <text:p text:style-name="P23">sünnipikkus<text:s/>–<text:s/>numbriline</text:p>
        </text:list-item>
        <text:list-item>
          <text:p text:style-name="P24">sünniviis<text:s/>(kood)<text:s/>–<text:s/>kategooriline</text:p>
        </text:list-item>
        <text:list-item>
          <text:p text:style-name="P25">sünniviis - kategooriline</text:p>
        </text:list-item>
      </text:list>
      <text:p text:style-name="Normaallaad">Näide, paari kirje baasil,<text:s/><text:s/>andmestikust<text:s/>sünteetiliste andmetega:</text:p>
      <text:p text:style-name="Normaallaad"><draw:frame draw:style-name="a0" draw:name="Pilt 1" text:anchor-type="as-char" svg:x="0in" svg:y="0in" svg:width="6.3in" svg:height="0.47917in" style:rel-width="scale" style:rel-height="scale"><draw:image xlink:href="media/image1.png" xlink:type="simple" xlink:show="embed" xlink:actuate="onLoad"/><svg:title/><svg:desc/></draw:frame></text:p>
      <text:soft-page-break/>
      <text:p text:style-name="P26">Andmestiku uurimine.</text:p>
      <text:p text:style-name="Normaallaad">Andmestik sisaldab<text:s/>algselt ja puhastamata kujul<text:s/>kokku<text:s/><text:span text:style-name="T27">48559</text:span><text:s/>kirjet, mis hinnanguliselt on ligikaudu 4<text:s/>kuni<text:s/>4,5 aasta sünniandmed.</text:p>
      <text:p text:style-name="P28">Puhastamine.</text:p>
      <text:p text:style-name="Normaallaad">Väljavõte programmi väljundist, mis näitab puuduvaid väärtuseid summeerituna väljade kaupa:</text:p>
      <text:p text:style-name="Normaallaad"><draw:frame draw:style-name="a1" draw:name="Pilt 1" text:anchor-type="as-char" svg:x="0in" svg:y="0in" svg:width="2.6523in" svg:height="2.6246in" style:rel-width="scale" style:rel-height="scale"><draw:image xlink:href="media/image2.png" xlink:type="simple" xlink:show="embed" xlink:actuate="onLoad"/><svg:title/><svg:desc/></draw:frame></text:p>
      <text:p text:style-name="Normaallaad">Isa vanus on selgelt puudulikum väärtus andmestikus.<text:s/>Otsus on<text:s/><text:span text:style-name="T29">puuduvate väärtustega read eemaldada</text:span><text:s/>,<text:s/>ligi<text:s/><text:span text:style-name="T30">2,75%</text:span><text:s/>ridadest, alternatiiv oleks väärtused asendada mediaanväärtustega. Puhastamise tulemuseks on täiuslikud kirjed:</text:p>
      <text:p text:style-name="Normaallaad"><draw:frame draw:style-name="a2" draw:name="Pilt 1" text:anchor-type="as-char" svg:x="0in" svg:y="0in" svg:width="2.67729in" svg:height="2.62509in" style:rel-width="scale" style:rel-height="scale"><draw:image xlink:href="media/image3.png" xlink:type="simple" xlink:show="embed" xlink:actuate="onLoad"/><svg:title/><svg:desc/></draw:frame><text:s/></text:p>
      <text:p text:style-name="Normaallaad">Puhastatud andmestik sisaldab<text:s/>47262<text:s/>kirjet.</text:p>
      <text:p text:style-name="P31">Ema andmed</text:p>
      <text:p text:style-name="Normaallaad">Info ema vanuse kohta, väljavõte programmi väljundist:</text:p>
      <text:p text:style-name="Normaallaad"><draw:frame draw:style-name="a3" draw:name="Pilt 1" text:anchor-type="as-char" svg:x="0in" svg:y="0in" svg:width="1.86483in" svg:height="1.38232in" style:rel-width="scale" style:rel-height="scale"><draw:image xlink:href="media/image4.png" xlink:type="simple" xlink:show="embed" xlink:actuate="onLoad"/><svg:title/><svg:desc/></draw:frame></text:p>
      <text:soft-page-break/>
      <text:p text:style-name="Normaallaad">Selgitus. Keskmine vanus on<text:s/><text:span text:style-name="T32">31,2</text:span><text:s/>ja mediaan<text:s/><text:span text:style-name="T33">31</text:span><text:s/>aastat, mis tähendab, et jaotus on üsna sümmeetriline, normaaljaotuse sarnane. Standardhälve ligi<text:s/><text:span text:style-name="T34">5,36</text:span><text:s/>aastat, enamik emasid jäävad vahemikku 26 kuni 36 aastat. Kvartiilidest, 25% on 28 ja 75% 35 aastat, ehk sellesse vahemikku jääb pool kõigist emadest. <text:s/>Äärmustest,<text:s/>ema vanuse miinimum<text:s/>on 14 ja maksimum<text:s/>on 55 aastat.</text:p>
      <text:p text:style-name="Normaallaad">Ema perekonnaseis, väljavõte programmi väljundist:</text:p>
      <text:p text:style-name="Normaallaad"><draw:frame draw:style-name="a4" draw:name="Pilt 1" text:anchor-type="as-char" svg:x="0in" svg:y="0in" svg:width="2.59773in" svg:height="0.93439in" style:rel-width="scale" style:rel-height="scale"><draw:image xlink:href="media/image5.png" xlink:type="simple" xlink:show="embed" xlink:actuate="onLoad"/><svg:title/><svg:desc/></draw:frame></text:p>
      <text:p text:style-name="Normaallaad">Mitteregistreeritud suhtes olevate emade<text:s/>arv on suurem, kui registreeritud abielus olevate emade arv, ja<text:s/>suhe on<text:s/>1,296 ehk ligi<text:s/><text:span text:style-name="T35">1,3</text:span><text:span text:style-name="T36"><text:s/>(ligikaudu 56:44)</text:span>.</text:p>
      <text:p text:style-name="Normaallaad">Ema suitsetamise harjumused:</text:p>
      <text:p text:style-name="Normaallaad"><draw:frame draw:style-name="a5" draw:name="Pilt 1" text:anchor-type="as-char" svg:x="0in" svg:y="0in" svg:width="4.86813in" svg:height="0.83067in" style:rel-width="scale" style:rel-height="scale"><draw:image xlink:href="media/image6.png" xlink:type="simple" xlink:show="embed" xlink:actuate="onLoad"/><svg:title/><svg:desc/></draw:frame></text:p>
      <text:p text:style-name="Normaallaad">Mittesuitsetajate ja (pigem) suitsetajate osakaal ligikaudu<text:s/><text:span text:style-name="T37">92:8</text:span>, ehk suhtarvuna 11,56:1 (ligi 11,6 mittesuitsetajat iga suitsetaja kohta).</text:p>
      <text:p text:style-name="P38">Isa andmed</text:p>
      <text:p text:style-name="Normaallaad">Info isa vanuse kohta, väljavõte programmi väljundist:</text:p>
      <text:p text:style-name="Normaallaad"><draw:frame draw:style-name="a6" draw:name="Pilt 1" text:anchor-type="as-char" svg:x="0in" svg:y="0in" svg:width="1.85058in" svg:height="1.35111in" style:rel-width="scale" style:rel-height="scale"><draw:image xlink:href="media/image7.png" xlink:type="simple" xlink:show="embed" xlink:actuate="onLoad"/><svg:title/><svg:desc/></draw:frame></text:p>
      <text:p text:style-name="Normaallaad">Selgitus. Keskmine vanus on<text:s/><text:span text:style-name="T39">3</text:span><text:span text:style-name="T40">3,9</text:span><text:s/>ja mediaan<text:s/><text:span text:style-name="T41">3</text:span><text:span text:style-name="T42">3</text:span><text:s/>aastat, mis tähendab, et jaotus, ema vanusega sarnaselt, on üsna sümmeetriline, normaaljaotuse sarnane. Standardhälve ligi<text:s/><text:span text:style-name="T43">6,3</text:span><text:s/>aastat, enamik<text:s/>isasid<text:s/>jäävad vahemikku 28 kuni 40 aastat. Kvartiilidest, 25% on 30 ja 75% 38 aastat, ehk sellesse vahemikku jääb pool kõikidest<text:s/>isadest. <text:s/>Äärmustest, isa vanuse miinimum on 14 ja maksimum on 79!<text:s/>aastat. Andmestik sisaldab siin väga äärmuslikke väärtusi.</text:p>
      <text:p text:style-name="P44">Vanemate vanuse vahe.</text:p>
      <text:p text:style-name="Normaallaad">Vanemate vanuse vahe , arvutatuna: isa vanus – ema vanus, <text:s/>väljavõte programmi väljundist:</text:p>
      <text:p text:style-name="Normaallaad"><draw:frame draw:style-name="a7" draw:name="Pilt 1" text:anchor-type="as-char" svg:x="0in" svg:y="0in" svg:width="1.90436in" svg:height="1.36394in" style:rel-width="scale" style:rel-height="scale"><draw:image xlink:href="media/image8.png" xlink:type="simple" xlink:show="embed" xlink:actuate="onLoad"/><svg:title/><svg:desc/></draw:frame></text:p>
      <text:soft-page-break/>
      <text:p text:style-name="Normaallaad">Keskmine vahe<text:s/><text:span text:style-name="T45">2,76</text:span>, ehk keskmiselt on isa emast vanem 2,8 aastat. Mediaan on lähedane keskmisele ja on<text:s/><text:span text:style-name="T46">2</text:span>. Standardhälve ligi<text:s/><text:span text:style-name="T47">4,81</text:span><text:s/>aastat, mis on keskmist arvestades suhteliselt suur. Kvartiilidest, 25% on 0 ja 75% 5 aastat. Äärmustest, vanusevahe miinimum on -23, see tähendab et ema on isast 23 aastat vanem, ja maksimum on 42 aastat, just niipalju isa emast vanem. <text:s/>Seda eelpool arvestades tähendab, et jaotus on hajuv ja varieerub, suure vanusevahega paare on omajagu.</text:p>
      <text:p text:style-name="Normaallaad"/>
      <text:p text:style-name="P48">Laste andmed</text:p>
      <text:p text:style-name="Normaallaad">Sündinud laste sooline jaotus, väljavõte programmi väljundist:</text:p>
      <text:p text:style-name="Normaallaad"><draw:frame draw:style-name="a8" draw:name="Pilt 1" text:anchor-type="as-char" svg:x="0in" svg:y="0in" svg:width="1.45936in" svg:height="0.44647in" style:rel-width="scale" style:rel-height="scale"><draw:image xlink:href="media/image9.png" xlink:type="simple" xlink:show="embed" xlink:actuate="onLoad"/><svg:title/><svg:desc/></draw:frame></text:p>
      <text:p text:style-name="Normaallaad">Suhe on ligikaudu<text:s/><text:span text:style-name="T49">51,3%</text:span><text:s/>poisse ja<text:s/><text:span text:style-name="T50">48,7%</text:span><text:s/>tüdrukuid (ligikaudu 105 poissi 100 tüdruku kohta).</text:p>
      <text:p text:style-name="Normaallaad">Laste sünnikaal, väljavõte programmi väljundist:</text:p>
      <text:p text:style-name="Normaallaad"><draw:frame draw:style-name="a9" draw:name="Pilt 1" text:anchor-type="as-char" svg:x="0in" svg:y="0in" svg:width="1.88329in" svg:height="1.40245in" style:rel-width="scale" style:rel-height="scale"><draw:image xlink:href="media/image10.png" xlink:type="simple" xlink:show="embed" xlink:actuate="onLoad"/><svg:title/><svg:desc/></draw:frame></text:p>
      <text:p text:style-name="Normaallaad">Keskmine sünnikaal on<text:s/><text:span text:style-name="T51">3529</text:span><text:s/>ja mediaan<text:s/><text:span text:style-name="T52">3564</text:span>, viimane on veidi suurem<text:s/>keskmisest. Standardhälve on<text:s/><text:span text:style-name="T53">554,8</text:span>, seega sünnikaal varieerub üsna suurelt, jäädes ligikaudu vahemikku 3000 – 4100. Kvartiilidest 25% on 3234 ja 75%<text:s/>on<text:s/>3880, ehk poolte laste sünnikaal jääb siia vahemikku.<text:s/>Äärmustest, lapse kaalu miinimum on 410 ja maksimum on 6100.<text:s/>Kõik kaalud on grammides. Võrreldes miinimumi ja keskmist, siis jaotus on veidi viltune.<text:s/>Erinditest tähelepanuväärne ongi miinimum.</text:p>
      <text:p text:style-name="P54"><draw:frame draw:style-name="a10" draw:name="Pilt 9" text:anchor-type="as-char" svg:x="0in" svg:y="0in" svg:width="5.01672in" svg:height="3.70226in" style:rel-width="scale" style:rel-height="scale"><draw:image xlink:href="media/image11.png" xlink:type="simple" xlink:show="embed" xlink:actuate="onLoad"/><svg:title/><svg:desc/></draw:frame></text:p>
      <text:p text:style-name="P55">Sünnikaalu jaotus</text:p>
      <text:soft-page-break/>
      <text:p text:style-name="P56"><draw:frame draw:style-name="a11" draw:name="Pilt 11" text:anchor-type="as-char" svg:x="0in" svg:y="0in" svg:width="4.96952in" svg:height="4.00596in" style:rel-width="scale" style:rel-height="scale"><draw:image xlink:href="media/image12.png" xlink:type="simple" xlink:show="embed" xlink:actuate="onLoad"/><svg:title/><svg:desc/></draw:frame></text:p>
      <text:p text:style-name="P57">Sünnikaal ja mediaanväärtus</text:p>
      <text:p text:style-name="P58"/>
      <text:p text:style-name="Normaallaad"/>
      <text:p text:style-name="Normaallaad">Laste sünnipikkus, väljavõte programmi väljundist:</text:p>
      <text:p text:style-name="Normaallaad"><draw:frame draw:style-name="a12" draw:name="Pilt 1" text:anchor-type="as-char" svg:x="0in" svg:y="0in" svg:width="1.90456in" svg:height="1.45723in" style:rel-width="scale" style:rel-height="scale"><draw:image xlink:href="media/image13.png" xlink:type="simple" xlink:show="embed" xlink:actuate="onLoad"/><svg:title/><svg:desc/></draw:frame></text:p>
      <text:p text:style-name="Normaallaad">Keskmine sünnipikkus on<text:s/><text:span text:style-name="T59">5</text:span><text:span text:style-name="T60">0,87</text:span><text:s/>ja mediaan<text:s/><text:span text:style-name="T61">5</text:span><text:span text:style-name="T62">1</text:span>. Standardhälve on<text:s/><text:span text:style-name="T63">2,70</text:span>, jaotus on üsna normaalne, jäädes ligikaudu 51 ümber, ehk varieeruvus on väike. Kvartiilidest 25% on 50 ja 75% 52, ehk poolte laste sünnipikkus jääb siia vahemikku. Äärmustest, lapse pikkuse miinimum on 21 ja maksimum on 61. Kõik pikkused on sentimeetrites. Erinditest on<text:s/>tähelepanuväärne väga madal miinimum. Kas see võib olla sisestusviga?</text:p>
      <text:soft-page-break/>
      <text:p text:style-name="P64"><draw:frame draw:style-name="a13" draw:name="Pilt 12" text:anchor-type="as-char" svg:x="0in" svg:y="0in" svg:width="4.89086in" svg:height="3.98569in" style:rel-width="scale" style:rel-height="scale"><draw:image xlink:href="media/image14.png" xlink:type="simple" xlink:show="embed" xlink:actuate="onLoad"/><svg:title/><svg:desc/></draw:frame></text:p>
      <text:p text:style-name="P65">Sünnipikkus, mediaanväärtus</text:p>
      <text:p text:style-name="Normaallaad"/>
      <text:p text:style-name="P66">Sündide andmed</text:p>
      <text:p text:style-name="Normaallaad">Raseduskestus päevades, väljavõte programmi väljundist</text:p>
      <text:p text:style-name="Normaallaad"><draw:frame draw:style-name="a14" draw:name="Pilt 1" text:anchor-type="as-char" svg:x="0in" svg:y="0in" svg:width="2.39497in" svg:height="1.39487in" style:rel-width="scale" style:rel-height="scale"><draw:image xlink:href="media/image15.png" xlink:type="simple" xlink:show="embed" xlink:actuate="onLoad"/><svg:title/><svg:desc/></draw:frame></text:p>
      <text:p text:style-name="Normaallaad">Keskmine raseduskestus on<text:s/><text:span text:style-name="T67">277</text:span><text:s/>ja mediaan<text:s/><text:span text:style-name="T68">279</text:span>. Standardhälve on<text:s/><text:span text:style-name="T69">12,56</text:span>, jaotus on normaalse lähedane, kuid veidi vasakule kaldu, millele viitab keskmisest suurem mediaan. Kvartiilidest 25% on 273 ja 75%<text:s/>on<text:s/>285, ehk poolte raseduskestus jääb siia, suhteliselt kitsasse 12 päeva, vahemikku. Äärmustest, miinimum on 154 ja maksimum on 304.</text:p>
      <text:soft-page-break/>
      <text:p text:style-name="P70"><draw:frame draw:style-name="a15" draw:name="Pilt 8" text:anchor-type="as-char" svg:x="0in" svg:y="0in" svg:width="4.23223in" svg:height="3.37244in" style:rel-width="scale" style:rel-height="scale"><draw:image xlink:href="media/image16.png" xlink:type="simple" xlink:show="embed" xlink:actuate="onLoad"/><svg:title/><svg:desc/></draw:frame></text:p>
      <text:p text:style-name="P71">Raseduskestus päevades</text:p>
      <text:p text:style-name="Normaallaad">Sünnitusviis, väljavõte programmi väljundist:</text:p>
      <text:p text:style-name="Normaallaad"><draw:frame draw:style-name="a16" draw:name="Pilt 1" text:anchor-type="as-char" svg:x="0in" svg:y="0in" svg:width="4.75025in" svg:height="1.33842in" style:rel-width="scale" style:rel-height="scale"><draw:image xlink:href="media/image17.png" xlink:type="simple" xlink:show="embed" xlink:actuate="onLoad"/><svg:title/><svg:desc/></draw:frame></text:p>
      <text:p text:style-name="P72"><draw:frame draw:style-name="a17" draw:name="Pilt 13" text:anchor-type="as-char" svg:x="0in" svg:y="0in" svg:width="5.53665in" svg:height="4.4259in" style:rel-width="scale" style:rel-height="scale"><draw:image xlink:href="media/image18.png" xlink:type="simple" xlink:show="embed" xlink:actuate="onLoad"/><svg:title/><svg:desc/></draw:frame></text:p>
      <text:p text:style-name="P73">Sünnitusviisi jaotus</text:p>
      <text:p text:style-name="Normaallaad"/>
      <text:p text:style-name="Normaallaad"/>
      <text:p text:style-name="P74">Seoste uurimine.</text:p>
      <text:p text:style-name="Normaallaad">Seoste uurimisel keskendume esmalt numbrilistele seostele, mustrite või trendide leidmisele. Numbrilised väärtused on:<text:s/></text:p>
      <text:list text:style-name="LFO4" text:continue-numbering="true">
        <text:list-item>
          <text:p text:style-name="P75">Raseduskestus päevades</text:p>
        </text:list-item>
        <text:list-item>
          <text:p text:style-name="P76">Ema vanus</text:p>
        </text:list-item>
        <text:list-item>
          <text:p text:style-name="P77">Isa vanus</text:p>
        </text:list-item>
        <text:list-item>
          <text:p text:style-name="P78">Sünnikaal</text:p>
        </text:list-item>
        <text:list-item>
          <text:p text:style-name="P79">Sünnipikkus</text:p>
        </text:list-item>
      </text:list>
      <text:p text:style-name="Normaallaad">Seoste kuvamiseks koostame tunnuste paarikaupa võrdlusgraafiku.</text:p>
      <text:p text:style-name="Normaallaad"><draw:frame draw:style-name="a18" draw:name="Pilt 2" text:anchor-type="as-char" svg:x="0in" svg:y="0in" svg:width="7.1791in" svg:height="4.48219in" style:rel-width="scale" style:rel-height="scale"><draw:image xlink:href="media/image19.png" xlink:type="simple" xlink:show="embed" xlink:actuate="onLoad"/><svg:title/><svg:desc/></draw:frame></text:p>
      <text:p text:style-name="P80">Tunnuspaaride võrdlusgraafik</text:p>
      <text:p text:style-name="Normaallaad">Tunnuspaaride vaatlemisel jääb silma, et sünnikaalu ja -pikkuse<text:s/>suhte<text:s/>graafikud<text:s/>ema ja isa vanusesse<text:s/>on ühtlaselt väga hajusad ja ilmselt mingit otsest seost, trendi vms välja ei joonistu. Ema ja isa vanuse vahel on mingi seos, varasemast selgus, et vanusevahe mediaanväärtus oli 2 siis see kinnitab seda. Selgelt joonistub välja seos raseduskestuse päevades ja sünnikaalu ning sünnipikkuse vahel. Kui raseduskestuse ja sünnipikkuse vahel tundub olevat peaaegu lineaarne suhe, siis väga huvitav suhe on raseduskestuse ja sünnikaalu vahel. See kujutab<text:s/>graafiliselt<text:s/>laugjat kasvavat kõverat.<text:s/></text:p>
      <text:p text:style-name="P81">Tunnuste korrelatsioonid.</text:p>
      <text:p text:style-name="Normaallaad">Järgmisena vaatleme numbriliste tunnuste korrelatsioone, mis annavad matemaatilise kinnituse tunnuste omavahelisest seosest.</text:p>
      <text:soft-page-break/>
      <text:p text:style-name="Normaallaad">Korreleeruvad numbrilised väärtused, ehk korrelatsioonimaatriks:<draw:frame draw:style-name="a19" draw:name="Pilt 3" text:anchor-type="as-char" svg:x="0in" svg:y="0in" svg:width="5.4628in" svg:height="4.88473in" style:rel-width="scale" style:rel-height="scale"><draw:image xlink:href="media/image20.png" xlink:type="simple" xlink:show="embed" xlink:actuate="onLoad"/><svg:title/><svg:desc/></draw:frame></text:p>
      <text:p text:style-name="Normaallaad">Korrelatsioonimaatriks toob selgelt välja, et sünnikaal ja sünnipikkus on omavahel väga tugevas positiivses korrelatsioonis 0,82, samuti on sünnikaalul ja sünnipikkusel mõõdukas positiivne seos raseduskestusega, vastavalt 0,63 sünnikaaluga ja 0,65 sünnipikkusega. Mis on igati ka loogiline, mida pikem rasedusperiood, seda suurem kaal ja pikkus. <text:s/>Tugevam positiivne seos on ka ema ja isa vanusel: 0,67.<text:s/>Ema ja isa vanusel<text:s/>näib<text:s/>puuduvat otsene<text:s/>seos sünnikaalu ja sünnipikkusega, huvitavalt on<text:s/>aga<text:s/>väga nõrk ja negatiivne seos raseduskestusega.</text:p>
      <text:p text:style-name="P82">Sünnistatistika.</text:p>
      <text:p text:style-name="Normaallaad">Varasemale infole lisaks ka visuaalselt<text:s/>sündide sooline jaotus:</text:p>
      <text:p text:style-name="P83"><draw:frame draw:style-name="a20" draw:name="Pilt 10" text:anchor-type="as-char" svg:x="0in" svg:y="0in" svg:width="3.42682in" svg:height="2.71705in" style:rel-width="scale" style:rel-height="scale"><draw:image xlink:href="media/image21.png" xlink:type="simple" xlink:show="embed" xlink:actuate="onLoad"/><svg:title/><svg:desc/></draw:frame></text:p>
      <text:p text:style-name="P84">Sündide sooline jaotus</text:p>
      <text:soft-page-break/>
      <text:p text:style-name="Normaallaad">Vaatleme ja võrdleme sünnikaalu ja sünnitusviiside suhteid. Olulisemad sünnikaalu<text:s/>mediaanide<text:s text:c="2"/>erinevused tulevad välja hädakeisrilõigete, tangsünnituste ja keisrilõige pärast ebaõnnestunud vaakumsünnituste osas. Nagu eespool selgus, siis selliste sünnitusviiside esinemine on pigem harva, mis tähendab, et siin võib tegemist olla nn „väikeste numbrite maagiaga“.</text:p>
      <text:p text:style-name="P85"><draw:frame draw:style-name="a21" draw:name="Pilt 14" text:anchor-type="as-char" svg:x="0in" svg:y="0in" svg:width="6.3in" svg:height="5.36319in" style:rel-width="scale" style:rel-height="scale"><draw:image xlink:href="media/image22.png" xlink:type="simple" xlink:show="embed" xlink:actuate="onLoad"/><svg:title/><svg:desc/></draw:frame></text:p>
      <text:p text:style-name="P86">Sünnitusviiside ja sünnikaalude suhted, mediaanväärtustega</text:p>
      <text:p text:style-name="P87">Sünnikaalu sõltuvus suitsetamisest. Hüpoteesi tõestus.</text:p>
      <text:p text:style-name="Normaallaad">Sünnikaalu sõltuvus suitsetamisest tuleb andmestiku analüüsides kenasti välja. Kui võrrelda sünnikaalu mediaanväärtusi mittesuitsetajate ja suitsetajate puhul, siis mittesuitsetajatel on see<text:s/><text:span text:style-name="T88">3570g</text:span><text:s/>ja suitsetajatel<text:s/><text:span text:style-name="T89">3438g</text:span>.<text:s/>Vahe 132g.</text:p>
      <text:soft-page-break/>
      <text:p text:style-name="P90"><draw:frame draw:style-name="a22" draw:name="Pilt 15" text:anchor-type="as-char" svg:x="0in" svg:y="0in" svg:width="5.78481in" svg:height="3.86929in" style:rel-width="scale" style:rel-height="scale"><draw:image xlink:href="media/image23.png" xlink:type="simple" xlink:show="embed" xlink:actuate="onLoad"/><svg:title/><svg:desc/></draw:frame></text:p>
      <text:p text:style-name="P91">Sünnikaalu sõltuvus suitsetamisest, mediaanväärtustega</text:p>
      <text:p text:style-name="Normaallaad">Kui võrrelda keskmiseid sünnikaale, siis erinevus on veelgi suurem, keskmine sünnikaal mittesuitsetajatel on<text:s/><text:span text:style-name="T92">3539g</text:span><text:s/>ja suitsetajatel<text:s/><text:span text:style-name="T93">3387g</text:span>.<text:s/>Vahe 152g. Seega hüpotees sai kinnituse.</text:p>
      <text:p text:style-name="P94"><draw:frame draw:style-name="a23" draw:name="Pilt 16" text:anchor-type="as-char" svg:x="0in" svg:y="0in" svg:width="5.74342in" svg:height="4.01634in" style:rel-width="scale" style:rel-height="scale"><draw:image xlink:href="media/image24.png" xlink:type="simple" xlink:show="embed" xlink:actuate="onLoad"/><svg:title/><svg:desc/></draw:frame></text:p>
      <text:p text:style-name="P95">Sünnikaalu sõltuvus suitsetamisest, keskväärtustega</text:p>
      <text:p text:style-name="Normaallaad"/>
      <text:p text:style-name="P96">Masinõpe ja mudelite treenimine<text:s/></text:p>
      <text:p text:style-name="Normaallaad">Kavas oli<text:s/>koostada masinõppe mudel, mis ennustab<text:s/>valitud<text:s/>tunnuste järgi<text:s/>sünnikaalu, ehk regressiooni mudel.<text:s/>Andmestikuga tutvumise järel langes otsus esmalt Random Forest(suvamets)<text:s/><text:soft-page-break/>kasuks.<text:s/>Hinnates Random Forestiga saavutatud tulemusi tekkis plaan treenida alternatiivne mudel,<text:s/>kasutades Gradient Boosting’ut(gradiendi võimendus), võrrelda mõlemat mudelit ja leida antud juhul parim.</text:p>
      <text:p text:style-name="Normaallaad">Mudeli treenimisel jäid tunnustest lõpuks valikusse:<text:s/>Raseduskestus päevades,<text:s/>Ema vanus<text:s/>ja<text:s/>Isa vanus, need siis numbrilistest tunnustest, ja<text:s/>Ema perekonnaseis,<text:s/>Suitsetamine kokku<text:s/>ja<text:s/>Lapse sugu<text:s/>kategoorilistest tunnustest.<text:s/><draw:frame draw:style-name="a24" draw:name="Pilt 1" text:anchor-type="as-char" svg:x="0in" svg:y="0in" svg:width="5.78416in" svg:height="2.78703in" style:rel-width="scale" style:rel-height="scale"><draw:image xlink:href="media/image25.png" xlink:type="simple" xlink:show="embed" xlink:actuate="onLoad"/><svg:title/><svg:desc/></draw:frame></text:p>
      <text:p text:style-name="Normaallaad">Programselt on meetodite realisatsioon paigutatud<text:s/>eraldi moodulitesse: randomForestModel ja gradientBoostinModel vastavalt. Treenimisel kasutame<text:s/>valdavalt<text:s/>pipeline’i, kuna<text:s/>see:</text:p>
      <text:list text:style-name="LFO5" text:continue-numbering="true">
        <text:list-item>
          <text:p text:style-name="P97">Võimaldab käsitleda puuduvaid väärtusi automaatselt, imputeerime</text:p>
        </text:list-item>
        <text:list-item>
          <text:p text:style-name="P98">Võimaldab mugavamalt<text:s/>kategooriaid<text:s/>õigesti kodeerida, nt rakendada One-Hot-Encoder</text:p>
        </text:list-item>
        <text:list-item>
          <text:p text:style-name="P99">Võimaldab mugavamalt<text:s/>numbrilisi<text:s/>väärtusi<text:s/>skaleerida, rakendame vastavat skaalerit</text:p>
        </text:list-item>
        <text:list-item>
          <text:p text:style-name="P100">Töötab<text:s/>uute andmetega<text:s/>otse</text:p>
        </text:list-item>
        <text:list-item>
          <text:p text:style-name="P101">Aitab vältida<text:s/>andmelekkeid</text:p>
        </text:list-item>
      </text:list>
      <text:p text:style-name="Normaallaad">Treenitud mudelite testimiseks<text:s/>on<text:s/>kasutatud<text:s/>kahte profiili, mis on kõiges muus identsed, välja arvatud lapse sugu, ja mis kujutavad keskmiste lähedasi väärtuseid. Täpsemalt: Ema vanus 30a, Isa vanus 32a, Ema perekonnaseis – abielus,<text:s/>ema mittesuitsetaja. Test arvutab<text:s/>prognoosijoone alates (raseduskestus) 175 päevast kuni 300 päevani, 5 päevase hüppega, ja arvutab välja<text:s/>neile päevadele<text:s/>vastavad<text:s/>sünnikaalud.<text:s/><text:s/></text:p>
      <text:p text:style-name="Normaallaad">Et saada kinnitust, et treenitud mudelid prognoosivad võimalikult reaalselt ja täpselt, on meetodite ennustused toodud välja<text:s/>reaalse<text:s/>andmestikuga võrreldes,<text:s/>ehk asetades prognoosijoone reaalsetele andmetele, ja<text:s/>millele on lisatud ka lisaks trendijoon(lineaarsirge).<text:s/></text:p>
      <text:p text:style-name="P102">Random Forest<text:s/>meetod</text:p>
      <text:p text:style-name="Normaallaad">Treeningu tulemused, väljavõte programmi väljundist:</text:p>
      <text:p text:style-name="Normaallaad"><draw:frame draw:style-name="a25" draw:name="Pilt 1" text:anchor-type="as-char" svg:x="0in" svg:y="0in" svg:width="2.01971in" svg:height="0.91508in" style:rel-width="scale" style:rel-height="scale"><draw:image xlink:href="media/image26.png" xlink:type="simple" xlink:show="embed" xlink:actuate="onLoad"/><svg:title/><svg:desc/></draw:frame></text:p>
      <text:p text:style-name="Normaallaad">Ennustusjoonel on väikseid "sakke" ja see on Random Forest'i puhul tüüpiline. Kuna prognoos on mitme otsustuspuu keskmine, siis<text:s/>sellest<text:s/>tulenevalt<text:s/>on ennustusjoon veidi astmeline või ebaühtlane.</text:p>
      <text:soft-page-break/>
      <text:p text:style-name="P103"><draw:frame draw:style-name="a26" draw:name="Pilt 4" text:anchor-type="as-char" svg:x="0in" svg:y="0in" svg:width="6.25159in" svg:height="4.03266in" style:rel-width="scale" style:rel-height="scale"><draw:image xlink:href="media/image27.png" xlink:type="simple" xlink:show="embed" xlink:actuate="onLoad"/><svg:title/><svg:desc/></draw:frame></text:p>
      <text:p text:style-name="P104">Random<text:s/>Forest<text:s/>mudel, sünnikaalu ennustus, poiss</text:p>
      <text:p text:style-name="Normaallaad"/>
      <text:p text:style-name="Normaallaad"><draw:frame draw:style-name="a27" draw:name="Pilt 5" text:anchor-type="as-char" svg:x="0in" svg:y="0in" svg:width="6.3in" svg:height="4.00694in" style:rel-width="scale" style:rel-height="scale"><draw:image xlink:href="media/image28.png" xlink:type="simple" xlink:show="embed" xlink:actuate="onLoad"/><svg:title/><svg:desc/></draw:frame></text:p>
      <text:p text:style-name="P105">Random Forest, sünnikaalu ennustus, tüdruk</text:p>
      <text:p text:style-name="P106">Gradient Boosting<text:s/>meetod</text:p>
      <text:p text:style-name="Normaallaad">Treeningu tulemused, väljavõte programmi väljundist:</text:p>
      <text:p text:style-name="Normaallaad"><draw:frame draw:style-name="a28" draw:name="Pilt 1" text:anchor-type="as-char" svg:x="0in" svg:y="0in" svg:width="1.90264in" svg:height="0.58047in" style:rel-width="scale" style:rel-height="scale"><draw:image xlink:href="media/image29.png" xlink:type="simple" xlink:show="embed" xlink:actuate="onLoad"/><svg:title/><svg:desc/></draw:frame></text:p>
      <text:soft-page-break/>
      <text:p text:style-name="Normaallaad">GB treenib otsustuspuid jadamisi, pidevalt tulemust parandades ja ennustusjoon on sujuv<text:s/>ning<text:s/>üldistab hästi.</text:p>
      <text:p text:style-name="Normaallaad"><draw:frame draw:style-name="a29" draw:name="Pilt 6" text:anchor-type="as-char" svg:x="0in" svg:y="0in" svg:width="6.3in" svg:height="3.96111in" style:rel-width="scale" style:rel-height="scale"><draw:image xlink:href="media/image30.png" xlink:type="simple" xlink:show="embed" xlink:actuate="onLoad"/><svg:title/><svg:desc/></draw:frame></text:p>
      <text:p text:style-name="P107">Gradient Boosting<text:s/>mudel, sünnikaalu ennustus, poiss</text:p>
      <text:p text:style-name="Normaallaad"><draw:frame draw:style-name="a30" draw:name="Pilt 7" text:anchor-type="as-char" svg:x="0in" svg:y="0in" svg:width="6.3in" svg:height="3.97569in" style:rel-width="scale" style:rel-height="scale"><draw:image xlink:href="media/image31.png" xlink:type="simple" xlink:show="embed" xlink:actuate="onLoad"/><svg:title/><svg:desc/></draw:frame></text:p>
      <text:p text:style-name="P108">Gradient Boosting<text:s/>mudel, sünnikaalu ennustus, tüdruk</text:p>
      <text:p text:style-name="Normaallaad"/>
      <text:p text:style-name="P109">Random<text:s/>Forest<text:s/>ja<text:s/>Gradient Boosting<text:s/>võrdlus</text:p>
      <text:p text:style-name="Normaallaad">Kui võrrelda RMSE’d, siis RF<text:s/>on kehvemate tulemustega<text:s/><text:span text:style-name="T110">466,50</text:span><text:s/>võrreldes GB<text:s/><text:span text:style-name="T111">416,79</text:span>. Samuti võrrelda kordajaid R2,<text:s/>RF<text:s/>puhul on see<text:s/><text:span text:style-name="T112">0,302</text:span><text:s/>ja GB puhul<text:s/><text:span text:style-name="T113">0,443</text:span>, mis<text:s/>on<text:s/>ka<text:s/>GB kasuks.</text:p>
      <text:soft-page-break/>
      <text:p text:style-name="Normaallaad">Kui võrdleme mudelite prognoose võrreldavatelt graafikutelt, siis selgelt joonistub välja<text:s/>Gradient Boosting<text:s/>ühtlasem, sujuvam ja täpsemalt üldistavam joon.</text:p>
      <text:p text:style-name="P114">Mudelite võrdluse tulemus ja hinnang.</text:p>
      <text:p text:style-name="Normaallaad">Loodud ja treenitud mudelite võrdluses selgub, et Gradient Boosting’ul põhinev mudel on<text:s/>siin<text:s/><text:s/>selgelt paremate omadustega ja<text:s/>minu<text:s/>eelistus langeb selle kasuks.</text:p>
      <text:p text:style-name="P115">Random Forest tulemuste parendamine/tuunimine.</text:p>
      <text:p text:style-name="Normaallaad">Hea kogemus ja õppemoment. Proovisin Random Forest tulemust parandada ja kasutada tuunimist, ehk leida parim<text:s/>parameetrite<text:s/>konfiguratsioon.<text:s/>Toimingu tulemuseks<text:s/>on esmapilgul justkui parem RMSE<text:s/>nii<text:s/>sünnikaalu, kui<text:s/>pikkuse osas.</text:p>
      <text:p text:style-name="Normaallaad"><draw:frame draw:style-name="a31" draw:name="Pilt 1" text:anchor-type="as-char" svg:x="0in" svg:y="0in" svg:width="2.75857in" svg:height="0.60005in" style:rel-width="scale" style:rel-height="scale"><draw:image xlink:href="media/image32.png" xlink:type="simple" xlink:show="embed" xlink:actuate="onLoad"/><svg:title/><svg:desc/></draw:frame></text:p>
      <text:p text:style-name="Normaallaad">Sealhulgas parimad parameetrid mudeli tuunimisel:</text:p>
      <text:p text:style-name="Normaallaad"><draw:frame draw:style-name="a32" draw:name="Pilt 1" text:anchor-type="as-char" svg:x="0in" svg:y="0in" svg:width="7.47922in" svg:height="0.40059in" style:rel-width="scale" style:rel-height="scale"><draw:image xlink:href="media/image33.png" xlink:type="simple" xlink:show="embed" xlink:actuate="onLoad"/><svg:title/><svg:desc/></draw:frame></text:p>
      <text:p text:style-name="Normaallaad">Mudeli treenimisel parameetrite osakaal:</text:p>
      <text:p text:style-name="Normaallaad"><draw:frame draw:style-name="a33" draw:name="Pilt 1" text:anchor-type="as-char" svg:x="0in" svg:y="0in" svg:width="5.55728in" svg:height="1.80244in" style:rel-width="scale" style:rel-height="scale"><draw:image xlink:href="media/image34.png" xlink:type="simple" xlink:show="embed" xlink:actuate="onLoad"/><svg:title/><svg:desc/></draw:frame></text:p>
      <text:p text:style-name="Normaallaad"/>
      <text:p text:style-name="Normaallaad"/>
      <text:p text:style-name="Normaallaad">Pilt muutub, kui me võrdleme mudeli prognoosimisvõimet<text:s/>reaalsete andmetega võrreldes.</text:p>
      <text:soft-page-break/>
      <text:p text:style-name="Normaallaad"><draw:frame draw:style-name="a34" draw:name="Pilt 2" text:anchor-type="as-char" svg:x="0in" svg:y="0in" svg:width="6.76806in" svg:height="5.05972in" style:rel-width="scale" style:rel-height="scale"><draw:image xlink:href="media/image35.png" xlink:type="simple" xlink:show="embed" xlink:actuate="onLoad"/><svg:title/><svg:desc/></draw:frame></text:p>
      <text:p text:style-name="Normaallaad">Siit joonistub välja selge probleem sünnikaalu ennustamisel lühemate raseduskestvuste juures.<text:s/>Graafikul tumepunasega märgitud alas<text:s/>mudel<text:s/>„hallutsioneerib“<text:s/>ja sellist mudelit reaalsuses kasutada ei saa.</text:p>
      <text:p text:style-name="P116">Kokkuvõte.</text:p>
      <text:p text:style-name="Normaallaad">Andmestik sai puhastatud ja korralikult analüüsitud. Loodud sai kahel erineval meetodil põhinev masinõppe mudel, Random<text:s/>Forest ja Gradient Boosting meetodil vastavalt. Random Forest mudeli tuunimise tulemusel RMSE tunnused justkui paranesid, kuid mudel ei ennustanud sünnikaalu osaliselt õigesti ja seda mudelit kasutada ei saa.<text:s/>Plaan koostada ka kolmas mudel, mis põhineks närvivõrgul jäi ajapuudusel pooleli. Viimase puhul tekkis omapärane probleem sellega, et soovitud Tensorflow paketti ei õnnestunud, teatud tehnilistel põhjustel, kasutada ja PyTorch’i baasil implementatsioon võttis minu viimase vähesema kogemuse tõttu, oodatust rohkem aega.<text:s/></text:p>
      <text:p text:style-name="P117">Soovitused andmestiku täiendamiseks.</text:p>
      <text:p text:style-name="Normaallaad">Ema andmete osas võiks kaaluda järgmiste tunnuste lisamist:</text:p>
      <text:list text:style-name="LFO1" text:continue-numbering="true">
        <text:list-item>
          <text:p text:style-name="P118">ema kaal – numbriline tunnus</text:p>
        </text:list-item>
        <text:list-item>
          <text:p text:style-name="P119">ema pikkus – numbriline tunnus</text:p>
        </text:list-item>
        <text:list-item>
          <text:p text:style-name="P120">diabeet – kategooriline tunnus<text:s/></text:p>
        </text:list-item>
      </text:list>
      <text:p text:style-name="Normaallaad">Rahvapärane ütlemine on, et „suurtel emadel on suured lapsed“, seda võiks<text:s/>siis lisatud tunnuste korral<text:s/>kas tõestada või ümber lükata. Samuti<text:s/>peaks<text:s/>mõjutama<text:s/>diabeet lapse sünnikaalu.<text:s/>Kui on soov jälgida või analüüsida sünnikaalu muutumist ajas, siis vastavate trendide leidmiseks vajaks andmestik lisaks ka sünnikuupäeva infot.</text:p>
      <text:soft-page-break/>
      <text:p text:style-name="P121">Programmi kood<text:s/>ja seonduv materjal.</text:p>
      <text:p text:style-name="Normaallaad">Antud projekti raames arendatud kood, ja muu materjal,<text:s/>asub GitHub’is aadressil:<text:s/><text:a xlink:href="https://github.com/kaur-kt/ML_Synnid_regressioon_mudelid" office:target-frame-name="_top" xlink:show="replace"><text:span text:style-name="Hüperlink">Sünnikaalu regressiooni mudelid</text:span></text:a></text:p>
      <text:p text:style-name="Normaallaad"/>
      <text:p text:style-name="P122">Selgitused.</text:p>
      <text:p text:style-name="Normaallaad">RMSE – Root Means Squared Error,<text:s/>ruutkeskmine viga,<text:s/>mõõdik. Näitab , kui suure vea mudel keskmiselt teeb,<text:s/>mõõtühik sama, mis ennustataval väärtusel, elik samas mõõtkavas. Mida väiksem on mõõdiku väärtus, seda parem on mudeli prognoositäpsus.</text:p>
      <text:p text:style-name="Normaallaad">R2<text:s/>–<text:s/>determinatsioonikordaja. Mõõdab, kui suure osa andmete varieeruvusest suudab mudel seletada. Mida suurem number, seda paremini seletab mudel sihtmuutujate varieeruvust. Näiteks 1.0 võiks tähendada mudeli ideaalset sobivust.<text:s/></text:p>
      <text:p text:style-name="Normaallaad"/>
      <text:p text:style-name="Normaallaad"/>
      <text:p text:style-name="Normaallaad"/>
      <text:p text:style-name="Normaallaad"/>
      <text:p text:style-name="Normaallaa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t" fo:country="EE" style:language-asian="en" style:country-asian="US" style:language-complex="ar" style:country-complex="SA" style:text-combine="none" fo:hyphenate="true"/>
    </style:default-style>
    <style:style style:name="Pealkiri1" style:display-name="Pealkiri 1" style:family="paragraph" style:parent-style-name="Normaallaad" style:next-style-name="Normaallaa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Pealkiri2" style:display-name="Pealkiri 2" style:family="paragraph" style:parent-style-name="Normaallaad" style:next-style-name="Normaallaa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Pealkiri3" style:display-name="Pealkiri 3" style:family="paragraph" style:parent-style-name="Normaallaad" style:next-style-name="Normaallaa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Pealkiri4" style:display-name="Pealkiri 4" style:family="paragraph" style:parent-style-name="Normaallaad" style:next-style-name="Normaallaa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Pealkiri5" style:display-name="Pealkiri 5" style:family="paragraph" style:parent-style-name="Normaallaad" style:next-style-name="Normaallaa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Pealkiri6" style:display-name="Pealkiri 6" style:family="paragraph" style:parent-style-name="Normaallaad" style:next-style-name="Normaallaa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Pealkiri7" style:display-name="Pealkiri 7" style:family="paragraph" style:parent-style-name="Normaallaad" style:next-style-name="Normaallaa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Pealkiri8" style:display-name="Pealkiri 8" style:family="paragraph" style:parent-style-name="Normaallaad" style:next-style-name="Normaallaa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Pealkiri9" style:display-name="Pealkiri 9" style:family="paragraph" style:parent-style-name="Normaallaad" style:next-style-name="Normaallaad" style:default-outline-level="9">
      <style:paragraph-properties fo:keep-with-next="always" fo:keep-together="always" fo:margin-bottom="0in"/>
      <style:text-properties style:font-name-asian="Times New Roman" style:font-name-complex="Times New Roman" fo:color="#272727" fo:hyphenate="false"/>
    </style:style>
    <style:style style:name="Normaallaad" style:display-name="Normaallaad" style:family="paragraph">
      <style:text-properties fo:hyphenate="false"/>
    </style:style>
    <style:style style:name="Lõiguvaikefont" style:display-name="Lõigu vaikefont" style:family="text"/>
    <style:style style:name="Pealkiri1Märk" style:display-name="Pealkiri 1 Märk" style:family="text" style:parent-style-name="Lõiguvaikefont">
      <style:text-properties style:font-name="Aptos Display" style:font-name-asian="Times New Roman" style:font-name-complex="Times New Roman" fo:color="#0F4761" fo:font-size="20pt" style:font-size-asian="20pt" style:font-size-complex="20pt"/>
    </style:style>
    <style:style style:name="Pealkiri2Märk" style:display-name="Pealkiri 2 Märk" style:family="text" style:parent-style-name="Lõiguvaikefont">
      <style:text-properties style:font-name="Aptos Display" style:font-name-asian="Times New Roman" style:font-name-complex="Times New Roman" fo:color="#0F4761" fo:font-size="16pt" style:font-size-asian="16pt" style:font-size-complex="16pt"/>
    </style:style>
    <style:style style:name="Pealkiri3Märk" style:display-name="Pealkiri 3 Märk" style:family="text" style:parent-style-name="Lõiguvaikefont">
      <style:text-properties style:font-name-asian="Times New Roman" style:font-name-complex="Times New Roman" fo:color="#0F4761" fo:font-size="14pt" style:font-size-asian="14pt" style:font-size-complex="14pt"/>
    </style:style>
    <style:style style:name="Pealkiri4Märk" style:display-name="Pealkiri 4 Märk" style:family="text" style:parent-style-name="Lõiguvaikefont">
      <style:text-properties style:font-name-asian="Times New Roman" style:font-name-complex="Times New Roman" fo:font-style="italic" style:font-style-asian="italic" style:font-style-complex="italic" fo:color="#0F4761"/>
    </style:style>
    <style:style style:name="Pealkiri5Märk" style:display-name="Pealkiri 5 Märk" style:family="text" style:parent-style-name="Lõiguvaikefont">
      <style:text-properties style:font-name-asian="Times New Roman" style:font-name-complex="Times New Roman" fo:color="#0F4761"/>
    </style:style>
    <style:style style:name="Pealkiri6Märk" style:display-name="Pealkiri 6 Märk" style:family="text" style:parent-style-name="Lõiguvaikefont">
      <style:text-properties style:font-name-asian="Times New Roman" style:font-name-complex="Times New Roman" fo:font-style="italic" style:font-style-asian="italic" style:font-style-complex="italic" fo:color="#595959"/>
    </style:style>
    <style:style style:name="Pealkiri7Märk" style:display-name="Pealkiri 7 Märk" style:family="text" style:parent-style-name="Lõiguvaikefont">
      <style:text-properties style:font-name-asian="Times New Roman" style:font-name-complex="Times New Roman" fo:color="#595959"/>
    </style:style>
    <style:style style:name="Pealkiri8Märk" style:display-name="Pealkiri 8 Märk" style:family="text" style:parent-style-name="Lõiguvaikefont">
      <style:text-properties style:font-name-asian="Times New Roman" style:font-name-complex="Times New Roman" fo:font-style="italic" style:font-style-asian="italic" style:font-style-complex="italic" fo:color="#272727"/>
    </style:style>
    <style:style style:name="Pealkiri9Märk" style:display-name="Pealkiri 9 Märk" style:family="text" style:parent-style-name="Lõiguvaikefont">
      <style:text-properties style:font-name-asian="Times New Roman" style:font-name-complex="Times New Roman" fo:color="#272727"/>
    </style:style>
    <style:style style:name="Pealkiri" style:display-name="Pealkiri" style:family="paragraph" style:parent-style-name="Normaallaad" style:next-style-name="Normaallaa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PealkiriMärk" style:display-name="Pealkiri Märk" style:family="text" style:parent-style-name="Lõiguvaikefont">
      <style:text-properties style:font-name="Aptos Display" style:font-name-asian="Times New Roman" style:font-name-complex="Times New Roman" fo:letter-spacing="-0.0069in" style:letter-kerning="true" fo:font-size="28pt" style:font-size-asian="28pt" style:font-size-complex="28pt"/>
    </style:style>
    <style:style style:name="Alapealkiri" style:display-name="Alapealkiri" style:family="paragraph" style:parent-style-name="Normaallaad" style:next-style-name="Normaallaad">
      <style:text-properties style:font-name-asian="Times New Roman" style:font-name-complex="Times New Roman" fo:color="#595959" fo:letter-spacing="0.0104in" fo:font-size="14pt" style:font-size-asian="14pt" style:font-size-complex="14pt" fo:hyphenate="false"/>
    </style:style>
    <style:style style:name="AlapealkiriMärk" style:display-name="Alapealkiri Märk" style:family="text" style:parent-style-name="Lõiguvaikefont">
      <style:text-properties style:font-name-asian="Times New Roman" style:font-name-complex="Times New Roman" fo:color="#595959" fo:letter-spacing="0.0104in" fo:font-size="14pt" style:font-size-asian="14pt" style:font-size-complex="14pt"/>
    </style:style>
    <style:style style:name="Tsitaat" style:display-name="Tsitaat" style:family="paragraph" style:parent-style-name="Normaallaad" style:next-style-name="Normaallaad">
      <style:paragraph-properties fo:text-align="center" fo:margin-top="0.1111in"/>
      <style:text-properties fo:font-style="italic" style:font-style-asian="italic" style:font-style-complex="italic" fo:color="#404040" fo:hyphenate="false"/>
    </style:style>
    <style:style style:name="TsitaatMärk" style:display-name="Tsitaat Märk" style:family="text" style:parent-style-name="Lõiguvaikefont">
      <style:text-properties fo:font-style="italic" style:font-style-asian="italic" style:font-style-complex="italic" fo:color="#404040"/>
    </style:style>
    <style:style style:name="Loendilõik" style:display-name="Loendi lõik" style:family="paragraph" style:parent-style-name="Normaallaad">
      <style:paragraph-properties style:contextual-spacing="true" fo:margin-left="0.5in">
        <style:tab-stops/>
      </style:paragraph-properties>
      <style:text-properties fo:hyphenate="false"/>
    </style:style>
    <style:style style:name="Selgeltmärgatavrõhutus" style:display-name="Selgelt märgatav rõhutus" style:family="text" style:parent-style-name="Lõiguvaikefont">
      <style:text-properties fo:font-style="italic" style:font-style-asian="italic" style:font-style-complex="italic" fo:color="#0F4761"/>
    </style:style>
    <style:style style:name="Selgeltmärgatavtsitaat" style:display-name="Selgelt märgatav tsitaat" style:family="paragraph" style:parent-style-name="Normaallaad" style:next-style-name="Normaallaa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elgeltmärgatavtsitaatMärk" style:display-name="Selgelt märgatav tsitaat Märk" style:family="text" style:parent-style-name="Lõiguvaikefont">
      <style:text-properties fo:font-style="italic" style:font-style-asian="italic" style:font-style-complex="italic" fo:color="#0F4761"/>
    </style:style>
    <style:style style:name="Selgeltmärgatavviide" style:display-name="Selgelt märgatav viide" style:family="text" style:parent-style-name="Lõiguvaikefont">
      <style:text-properties fo:font-weight="bold" style:font-weight-asian="bold" style:font-weight-complex="bold" fo:font-variant="small-caps" fo:color="#0F4761" fo:letter-spacing="0.0034in"/>
    </style:style>
    <style:style style:name="Hüperlink" style:display-name="Hüperlink" style:family="text" style:parent-style-name="Lõiguvaikefont">
      <style:text-properties fo:color="#467886" style:text-underline-type="single" style:text-underline-style="solid" style:text-underline-width="auto" style:text-underline-mode="continuous"/>
    </style:style>
    <style:style style:name="Lahendamatamainimine" style:display-name="Lahendamata mainimine" style:family="text" style:parent-style-name="Lõiguvaikefont">
      <style:text-properties fo:color="#605E5C" fo:background-color="#E1DFDD"/>
    </style:style>
    <style:style style:name="Külastatudhüperlink" style:display-name="Külastatud hüperlink" style:family="text" style:parent-style-name="Lõiguvaikefon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aur Tammai - TAI</meta:initial-creator>
    <dc:creator>Kaur Tammai - TAI</dc:creator>
    <meta:creation-date>2026-05-08T20:55:00Z</meta:creation-date>
    <dc:date>2026-05-08T20:55:00Z</dc:date>
    <meta:print-date>2026-05-08T20:30:00Z</meta:print-date>
    <meta:template xlink:href="Normal" xlink:type="simple"/>
    <meta:editing-cycles>2</meta:editing-cycles>
    <meta:editing-duration>PT60S</meta:editing-duration>
    <meta:user-defined meta:name="MSIP_Label_defa4170-0d19-0005-0004-bc88714345d2_Enabled">true</meta:user-defined>
    <meta:user-defined meta:name="MSIP_Label_defa4170-0d19-0005-0004-bc88714345d2_SetDate">2026-04-30T21:18:00Z</meta:user-defined>
    <meta:user-defined meta:name="MSIP_Label_defa4170-0d19-0005-0004-bc88714345d2_Method">Standard</meta:user-defined>
    <meta:user-defined meta:name="MSIP_Label_defa4170-0d19-0005-0004-bc88714345d2_Name">defa4170-0d19-0005-0004-bc88714345d2</meta:user-defined>
    <meta:user-defined meta:name="MSIP_Label_defa4170-0d19-0005-0004-bc88714345d2_SiteId">8fe098d2-428d-4bd4-9803-7195fe96f0e2</meta:user-defined>
    <meta:user-defined meta:name="MSIP_Label_defa4170-0d19-0005-0004-bc88714345d2_ActionId">d4eccedd-684d-4046-85b9-8e1c71363ef0</meta:user-defined>
    <meta:user-defined meta:name="MSIP_Label_defa4170-0d19-0005-0004-bc88714345d2_ContentBits">0</meta:user-defined>
    <meta:user-defined meta:name="MSIP_Label_defa4170-0d19-0005-0004-bc88714345d2_Tag">10, 3, 0, 1</meta:user-defined>
    <meta:document-statistic meta:page-count="17" meta:paragraph-count="27" meta:word-count="2047" meta:character-count="13895" meta:row-count="98" meta:non-whitespace-character-count="11875"/>
  </office:meta>
</office:document-meta>
</file>